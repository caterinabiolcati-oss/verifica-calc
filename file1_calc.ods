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Verifica_20_Calc_20_V2_20_-_20_Esercizio_20_1_20__28_Voti_29_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ifica Calc V2 - Esercizio 1 (Voti)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Nome:</text:p>
          </table:table-cell>
          <table:table-cell table:style-name="ce2"/>
          <table:table-cell table:style-name="ce2" office:value-type="string" calcext:value-type="string">
            <text:p>Cognome:</text:p>
          </table:table-cell>
          <table:table-cell table:style-name="ce2"/>
          <table:table-cell table:style-name="ce2" office:value-type="string" calcext:value-type="string">
            <text:p>Data:</text:p>
          </table:table-cell>
          <table:table-cell table:style-name="ce2" table:number-columns-repeated="3"/>
          <table:table-cell table:style-name="ce4" table:number-columns-repeated="1016"/>
        </table:table-row>
        <table:table-row table:style-name="ro1">
          <table:table-cell table:style-name="ce2" table:number-columns-repeated="8"/>
          <table:table-cell table:style-name="ce4" table:number-columns-repeated="1016"/>
        </table:table-row>
        <table:table-row table:style-name="ro1">
          <table:table-cell table:style-name="ce2" office:value-type="string" calcext:value-type="string">
            <text:p>Studente</text:p>
          </table:table-cell>
          <table:table-cell table:style-name="ce2" office:value-type="string" calcext:value-type="string">
            <text:p>Voto 1</text:p>
          </table:table-cell>
          <table:table-cell table:style-name="ce2" office:value-type="string" calcext:value-type="string">
            <text:p>Voto 2</text:p>
          </table:table-cell>
          <table:table-cell table:style-name="ce2" office:value-type="string" calcext:value-type="string">
            <text:p>Voto 3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Minimo</text:p>
          </table:table-cell>
          <table:table-cell table:style-name="ce2" office:value-type="string" calcext:value-type="string">
            <text:p>Esito</text:p>
          </table:table-cell>
          <table:table-cell table:style-name="ce4" table:number-columns-repeated="1016"/>
        </table:table-row>
        <table:table-row table:style-name="ro1">
          <table:table-cell table:style-name="ce1" office:value-type="string" calcext:value-type="string">
            <text:p>Mari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ul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a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fia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ancesc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essandr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e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ert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lv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ovann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t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ar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deric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lentina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te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ic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i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ola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efan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ur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org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r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chele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atrice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manue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mona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ico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isti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ol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aria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audio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ert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ess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mon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k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cenz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rezi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ipp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rena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anluc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uel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ric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ella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leri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bora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brie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ti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ssim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etro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aud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vato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nzia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card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dia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e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squ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gel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enico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sari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sa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essandra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v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resa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zian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bri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geni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ic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ato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n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mberto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rbar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alter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trizia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rad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redana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anfranc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sunt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igi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mela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fae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i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agi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ome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nar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cett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t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ddale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im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mmacolata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20:38:09.2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rifica_20_Calc_20_V2_20_-_20_Esercizio_20_1_20__28_Voti_29_" style:display-name="PageStyle_Verifica Calc V2 - Esercizio 1 (Voti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6-04-27T20:43:27.233000000</dc:date>
    <meta:editing-duration>PT5M18S</meta:editing-duration>
    <meta:editing-cycles>2</meta:editing-cycles>
    <meta:document-statistic meta:table-count="1" meta:cell-count="411" meta:object-count="0"/>
  </office:meta>
</office:document-meta>
</file>